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C0000012C2C86F56C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a1a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8c2e1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width="0cm" draw:fill="solid" draw:fill-color="#f4f4f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width="0cm" draw:fill="solid" draw:fill-color="#0a66c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1a5c3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>
      <style:graphic-properties draw:stroke="none" svg:stroke-width="0cm" draw:fill="solid" draw:fill-color="#fff0e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>
      <style:graphic-properties draw:stroke="none" svg:stroke-width="0cm" draw:fill="solid" draw:fill-color="#e0e0e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>
      <style:graphic-properties draw:stroke="none" svg:stroke-width="0cm" draw:fill="solid" draw:fill-color="#d0402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>
      <style:graphic-properties draw:stroke="none" svg:stroke-width="0cm" draw:fill="solid" draw:fill-color="#1c729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>
      <style:graphic-properties draw:stroke="none" svg:stroke-width="0cm" draw:fill="solid" draw:fill-color="#55557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>
      <style:graphic-properties draw:stroke="none" svg:stroke-width="0cm" draw:fill="solid" draw:fill-color="#eeeef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>
      <style:graphic-properties draw:stroke="none" svg:stroke-width="0cm" draw:fill="solid" draw:fill-color="#2222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1a1a2e"/>
      <style:paragraph-properties fo:text-align="start"/>
      <style:text-properties fo:font-size="18pt"/>
    </style:style>
    <style:style style:name="P2" style:family="paragraph">
      <loext:graphic-properties draw:fill="solid" draw:fill-color="#8c2e1a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f4f4f8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0a66c2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1a5c3a"/>
      <style:paragraph-properties fo:text-align="start"/>
      <style:text-properties fo:font-size="18pt"/>
    </style:style>
    <style:style style:name="P16" style:family="paragraph">
      <loext:graphic-properties draw:fill="solid" draw:fill-color="#fff0ee"/>
      <style:paragraph-properties fo:text-align="start"/>
      <style:text-properties fo:font-size="18pt"/>
    </style:style>
    <style:style style:name="P17" style:family="paragraph">
      <loext:graphic-properties draw:fill="solid" draw:fill-color="#e0e0ea"/>
      <style:paragraph-properties fo:text-align="start"/>
      <style:text-properties fo:font-size="18pt"/>
    </style:style>
    <style:style style:name="P18" style:family="paragraph">
      <loext:graphic-properties draw:fill="solid" draw:fill-color="#d04020"/>
      <style:paragraph-properties fo:text-align="start"/>
      <style:text-properties fo:font-size="18pt"/>
    </style:style>
    <style:style style:name="P19" style:family="paragraph">
      <loext:graphic-properties draw:fill="solid" draw:fill-color="#1c7293"/>
      <style:paragraph-properties fo:text-align="start"/>
      <style:text-properties fo:font-size="18pt"/>
    </style:style>
    <style:style style:name="P20" style:family="paragraph">
      <loext:graphic-properties draw:fill="solid" draw:fill-color="#555577"/>
      <style:paragraph-properties fo:text-align="start"/>
      <style:text-properties fo:font-size="18pt"/>
    </style:style>
    <style:style style:name="P21" style:family="paragraph">
      <loext:graphic-properties draw:fill="solid" draw:fill-color="#eeeef4"/>
      <style:paragraph-properties fo:text-align="start"/>
      <style:text-properties fo:font-size="18pt"/>
    </style:style>
    <style:style style:name="P22" style:family="paragraph">
      <loext:graphic-properties draw:fill="solid" draw:fill-color="#222244"/>
      <style:paragraph-properties fo:text-align="start"/>
      <style:text-properties fo:font-size="1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1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2pt" fo:letter-spacing="0.212cm" fo:language="en" fo:country="US" fo:font-style="normal" style:text-underline-style="none" fo:font-weight="bold" fo:background-color="transparent" style:font-name-asian="Cambria1" style:font-size-asian="22pt" style:font-style-asian="normal" style:font-weight-asian="bold" style:font-name-complex="Cambria" style:font-size-complex="22pt" style:font-style-complex="normal" style:font-weight-complex="bold"/>
    </style:style>
    <style:style style:name="T3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mbria" fo:font-size="38pt" fo:letter-spacing="normal" fo:language="en" fo:country="US" fo:font-style="normal" style:text-underline-style="none" fo:font-weight="bold" fo:background-color="transparent" style:font-name-asian="Cambria1" style:font-size-asian="38pt" style:font-style-asian="normal" style:font-weight-asian="bold" style:font-name-complex="Cambria" style:font-size-complex="38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normal" fo:background-color="transparent" style:font-name-asian="Calibri2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5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mbria" fo:font-size="28pt" fo:letter-spacing="normal" fo:language="en" fo:country="US" fo:font-style="normal" style:text-underline-style="none" fo:font-weight="bold" fo:background-color="transparent" style:font-name-asian="Cambria1" style:font-size-asian="28pt" style:font-style-asian="normal" style:font-weight-asian="bold" style:font-name-complex="Cambria" style:font-size-complex="28pt" style:font-style-complex="normal" style:font-weight-complex="bold"/>
    </style:style>
    <style:style style:name="T8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mbria" fo:font-size="26pt" fo:letter-spacing="normal" fo:language="en" fo:country="US" fo:font-style="normal" style:text-underline-style="none" fo:font-weight="bold" fo:background-color="transparent" style:font-name-asian="Cambria1" style:font-size-asian="26pt" style:font-style-asian="normal" style:font-weight-asian="bold" style:font-name-complex="Cambria" style:font-size-complex="26pt" style:font-style-complex="normal" style:font-weight-complex="bold"/>
    </style:style>
    <style:style style:name="T9" style:family="text">
      <style:text-properties fo:font-variant="normal" fo:text-transform="none" fo:color="#8c2e1a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13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8.5pt" fo:letter-spacing="normal" fo:language="en" fo:country="US" fo:font-style="normal" style:text-underline-style="none" fo:font-weight="normal" fo:background-color="transparent" style:font-name-asian="Calibri2" style:font-size-asian="8.5pt" style:font-style-asian="normal" style:font-weight-asian="normal" style:font-name-complex="Calibri1" style:font-size-complex="8.5pt" style:font-style-complex="normal" style:font-weight-complex="normal"/>
    </style:style>
    <style:style style:name="T14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mbria" fo:font-size="30pt" fo:letter-spacing="normal" fo:language="en" fo:country="US" fo:font-style="normal" style:text-underline-style="none" fo:font-weight="bold" fo:background-color="transparent" style:font-name-asian="Cambria1" style:font-size-asian="30pt" style:font-style-asian="normal" style:font-weight-asian="bold" style:font-name-complex="Cambria" style:font-size-complex="30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8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ambria" style:font-size-complex="36pt" style:font-style-complex="normal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mbria" fo:font-size="24pt" fo:letter-spacing="normal" fo:language="en" fo:country="US" fo:font-style="normal" style:text-underline-style="none" fo:font-weight="bold" fo:background-color="transparent" style:font-name-asian="Cambria1" style:font-size-asian="24pt" style:font-style-asian="normal" style:font-weight-asian="bold" style:font-name-complex="Cambria" style:font-size-complex="24pt" style:font-style-complex="normal" style:font-weight-complex="bold"/>
    </style:style>
    <style:style style:name="T21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.5pt" fo:letter-spacing="normal" fo:language="en" fo:country="US" fo:font-style="normal" style:text-underline-style="none" fo:font-weight="normal" fo:background-color="transparent" style:font-name-asian="Calibri2" style:font-size-asian="13.5pt" style:font-style-asian="normal" style:font-weight-asian="normal" style:font-name-complex="Calibri1" style:font-size-complex="13.5pt" style:font-style-complex="normal" style:font-weight-complex="normal"/>
    </style:style>
    <style:style style:name="T23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1c7293" loext:opacity="100%" style:text-outline="false" style:text-line-through-style="none" style:text-line-through-type="none" style:text-position="0% 100%" style:font-name="Courier New" fo:font-size="13pt" fo:letter-spacing="normal" fo:language="en" fo:country="US" fo:font-style="normal" style:text-underline-style="none" fo:font-weight="bold" fo:background-color="transparent" style:font-name-asian="Courier New1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25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ourier New" fo:font-size="13pt" fo:letter-spacing="normal" fo:language="en" fo:country="US" fo:font-style="normal" style:text-underline-style="none" fo:font-weight="normal" fo:background-color="transparent" style:font-name-asian="Courier New1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26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ourier New" fo:font-size="13pt" fo:letter-spacing="normal" fo:language="en" fo:country="US" fo:font-style="normal" style:text-underline-style="none" fo:font-weight="bold" fo:background-color="transparent" style:font-name-asian="Courier New1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3pt" fo:letter-spacing="normal" fo:language="en" fo:country="US" fo:font-style="normal" style:text-underline-style="none" fo:font-weight="bold" fo:background-color="transparent" style:font-name-asian="Cambria1" style:font-size-asian="13pt" style:font-style-asian="normal" style:font-weight-asian="bold" style:font-name-complex="Cambria" style:font-size-complex="13pt" style:font-style-complex="normal" style:font-weight-complex="bold"/>
    </style:style>
    <style:style style:name="T30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2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3.5pt" fo:letter-spacing="normal" fo:language="en" fo:country="US" fo:font-style="normal" style:text-underline-style="none" fo:font-weight="normal" fo:background-color="transparent" style:font-name-asian="Calibri2" style:font-size-asian="13.5pt" style:font-style-asian="normal" style:font-weight-asian="normal" style:font-name-complex="Calibri1" style:font-size-complex="13.5pt" style:font-style-complex="normal" style:font-weight-complex="normal"/>
    </style:style>
    <style:style style:name="T33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name-asian="Calibri2" style:font-size-asian="36pt" style:font-style-asian="normal" style:font-weight-asian="bold" style:font-name-complex="Calibri1" style:font-size-complex="36pt" style:font-style-complex="normal" style:font-weight-complex="bold"/>
    </style:style>
    <style:style style:name="T34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Calibri2" style:font-size-asian="22pt" style:font-style-asian="normal" style:font-weight-asian="bold" style:font-name-complex="Calibri1" style:font-size-complex="22pt" style:font-style-complex="normal" style:font-weight-complex="bold"/>
    </style:style>
    <style:style style:name="T35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6" style:family="text">
      <style:text-properties fo:font-variant="normal" fo:text-transform="none" fo:color="#8c2e1a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37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1.5pt" fo:letter-spacing="normal" fo:language="en" fo:country="US" fo:font-style="normal" style:text-underline-style="none" fo:font-weight="normal" fo:background-color="transparent" style:font-name-asian="Calibri2" style:font-size-asian="11.5pt" style:font-style-asian="normal" style:font-weight-asian="normal" style:font-name-complex="Calibri1" style:font-size-complex="11.5pt" style:font-style-complex="normal" style:font-weight-complex="normal"/>
    </style:style>
    <style:style style:name="T38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name-asian="Calibri2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T39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0" style:family="text">
      <style:text-properties fo:font-variant="normal" fo:text-transform="none" fo:color="#8c2e1a" loext:opacity="10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bold" fo:background-color="transparent" style:font-name-asian="Cambria1" style:font-size-asian="12pt" style:font-style-asian="normal" style:font-weight-asian="bold" style:font-name-complex="Cambria" style:font-size-complex="12pt" style:font-style-complex="normal" style:font-weight-complex="bold"/>
    </style:style>
    <style:style style:name="T41" style:family="text">
      <style:text-properties fo:font-variant="normal" fo:text-transform="none" fo:color="#d04020" loext:opacity="10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bold" fo:background-color="transparent" style:font-name-asian="Cambria1" style:font-size-asian="12pt" style:font-style-asian="normal" style:font-weight-asian="bold" style:font-name-complex="Cambria" style:font-size-complex="12pt" style:font-style-complex="normal" style:font-weight-complex="bold"/>
    </style:style>
    <style:style style:name="T42" style:family="text">
      <style:text-properties fo:font-variant="normal" fo:text-transform="none" fo:color="#1a5c3a" loext:opacity="10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bold" fo:background-color="transparent" style:font-name-asian="Cambria1" style:font-size-asian="12pt" style:font-style-asian="normal" style:font-weight-asian="bold" style:font-name-complex="Cambria" style:font-size-complex="12pt" style:font-style-complex="normal" style:font-weight-complex="bold"/>
    </style:style>
    <style:style style:name="T43" style:family="text">
      <style:text-properties fo:font-variant="normal" fo:text-transform="none" fo:color="#1c7293" loext:opacity="10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bold" fo:background-color="transparent" style:font-name-asian="Cambria1" style:font-size-asian="12pt" style:font-style-asian="normal" style:font-weight-asian="bold" style:font-name-complex="Cambria" style:font-size-complex="12pt" style:font-style-complex="normal" style:font-weight-complex="bold"/>
    </style:style>
    <style:style style:name="T44" style:family="text">
      <style:text-properties fo:font-variant="normal" fo:text-transform="none" fo:color="#555577" loext:opacity="10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bold" fo:background-color="transparent" style:font-name-asian="Cambria1" style:font-size-asian="12pt" style:font-style-asian="normal" style:font-weight-asian="bold" style:font-name-complex="Cambria" style:font-size-complex="12pt" style:font-style-complex="normal" style:font-weight-complex="bold"/>
    </style:style>
    <style:style style:name="T45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4pt" fo:letter-spacing="normal" fo:language="en" fo:country="US" fo:font-style="normal" style:text-underline-style="none" fo:font-weight="bold" fo:background-color="transparent" style:font-name-asian="Cambria1" style:font-size-asian="14pt" style:font-style-asian="normal" style:font-weight-asian="bold" style:font-name-complex="Cambria" style:font-size-complex="14pt" style:font-style-complex="normal" style:font-weight-complex="bold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49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mbria" fo:font-size="44pt" fo:letter-spacing="normal" fo:language="en" fo:country="US" fo:font-style="normal" style:text-underline-style="none" fo:font-weight="bold" fo:background-color="transparent" style:font-name-asian="Cambria1" style:font-size-asian="44pt" style:font-style-asian="normal" style:font-weight-asian="bold" style:font-name-complex="Cambria" style:font-size-complex="44pt" style:font-style-complex="normal" style:font-weight-complex="bold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Calibri2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51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52" style:family="text">
      <style:text-properties fo:font-variant="normal" fo:text-transform="none" fo:color="#8888aa" loext:opacity="100%" style:text-outline="false" style:text-line-through-style="none" style:text-line-through-type="none" style:text-position="0% 100%" style:font-name="Calibri1" fo:font-size="11.5pt" fo:letter-spacing="normal" fo:language="en" fo:country="US" fo:font-style="normal" style:text-underline-style="none" fo:font-weight="normal" fo:background-color="transparent" style:font-name-asian="Calibri2" style:font-size-asian="11.5pt" style:font-style-asian="normal" style:font-weight-asian="normal" style:font-name-complex="Calibri1" style:font-size-complex="11.5pt" style:font-style-complex="normal" style:font-weight-complex="normal"/>
    </style:style>
    <style:style style:name="T53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55" style:family="text">
      <style:text-properties fo:font-variant="normal" fo:text-transform="none" fo:color="#1a1a2e" loext:opacity="100%" style:text-outline="false" style:text-line-through-style="none" style:text-line-through-type="none" style:text-position="0% 100%" style:font-name="Calibri1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1" style:font-size-asian="16pt" style:font-style-asian="normal" style:font-weight-asian="bold" style:font-name-complex="Cambria" style:font-size-complex="16pt" style:font-style-complex="normal" style:font-weight-complex="bold"/>
    </style:style>
    <style:style style:name="T57" style:family="text">
      <style:text-properties fo:font-variant="normal" fo:text-transform="none" fo:color="#8c2e1a" loext:opacity="100%" style:text-outline="false" style:text-line-through-style="none" style:text-line-through-type="none" style:text-position="0% 100%" style:font-name="Cambria" fo:font-size="14pt" fo:letter-spacing="normal" fo:language="en" fo:country="US" fo:font-style="normal" style:text-underline-style="none" fo:font-weight="bold" fo:background-color="transparent" style:font-name-asian="Cambria1" style:font-size-asian="14pt" style:font-style-asian="normal" style:font-weight-asian="bold" style:font-name-complex="Cambria" style:font-size-complex="14pt" style:font-style-complex="normal" style:font-weight-complex="bold"/>
    </style:style>
    <style:style style:name="T58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mbria" fo:font-size="34pt" fo:letter-spacing="normal" fo:language="en" fo:country="US" fo:font-style="normal" style:text-underline-style="none" fo:font-weight="bold" fo:background-color="transparent" style:font-name-asian="Cambria1" style:font-size-asian="34pt" style:font-style-asian="normal" style:font-weight-asian="bold" style:font-name-complex="Cambria" style:font-size-complex="34pt" style:font-style-complex="normal" style:font-weight-complex="bold"/>
    </style:style>
    <style:style style:name="T59" style:family="text">
      <style:text-properties fo:font-variant="normal" fo:text-transform="none" fo:color="#e8c547" loext:opacity="100%" style:text-outline="false" style:text-line-through-style="none" style:text-line-through-type="none" style:text-position="0% 100%" style:font-name="Calibri1" fo:font-size="52pt" fo:letter-spacing="normal" fo:language="en" fo:country="US" fo:font-style="normal" style:text-underline-style="none" fo:font-weight="bold" fo:background-color="transparent" style:font-name-asian="Calibri2" style:font-size-asian="52pt" style:font-style-asian="normal" style:font-weight-asian="bold" style:font-name-complex="Calibri1" style:font-size-complex="52pt" style:font-style-complex="normal" style:font-weight-complex="bold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34pt" fo:letter-spacing="normal" fo:language="en" fo:country="US" fo:font-style="normal" style:text-underline-style="none" fo:font-weight="bold" fo:background-color="transparent" style:font-name-asian="Cambria1" style:font-size-asian="34pt" style:font-style-asian="normal" style:font-weight-asian="bold" style:font-name-complex="Cambria" style:font-size-complex="3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8c5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888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1a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c2e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c72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d04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a5c3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5555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7.619cm" svg:height="7.619cm" svg:x="8.89cm" svg:y="0.76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" draw:text-style-name="P4" draw:layer="layout" svg:width="7.619cm" svg:height="2.539cm" svg:x="8.89cm" svg:y="1.778cm">
          <text:p text:style-name="P3"><text:span text:style-name="T1">கிள்ளி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7.619cm" svg:height="1.777cm" svg:x="8.89cm" svg:y="4.064cm">
          <text:p text:style-name="P3"><text:span text:style-name="T2">GHIL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22.351cm" svg:height="2.158cm" svg:x="1.524cm" svg:y="8.89cm">
          <text:p text:style-name="P3"><text:span text:style-name="T3">Ghilli Tokeniz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4" draw:layer="layout" svg:width="22.351cm" svg:height="1.65cm" svg:x="1.524cm" svg:y="11.049cm">
          <text:p text:style-name="P3"><text:span text:style-name="T4">The Hidden Tax on Every Tamil Word You Type to an A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22.351cm" svg:height="0.964cm" svg:x="1.524cm" svg:y="12.827cm">
          <text:p text:style-name="P3"><text:span text:style-name="T5">Manoj Mohan <text:s/>· <text:s/>TOSSConf26 <text:s/>· <text:s/>25 July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" draw:text-style-name="P10" draw:layer="layout" svg:width="22.859cm" svg:height="1.65cm" svg:x="1.27cm" svg:y="0.635cm">
          <text:p text:style-name="P9"><text:span text:style-name="T7">About the Speak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" draw:text-style-name="P10" draw:layer="layout" svg:width="14.731cm" svg:height="1.396cm" svg:x="1.27cm" svg:y="2.794cm">
          <text:p text:style-name="P9"><text:span text:style-name="T8">Manoj Moh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" draw:text-style-name="P10" draw:layer="layout" svg:width="14.731cm" svg:height="0.888cm" svg:x="1.27cm" svg:y="4.115cm">
          <text:p text:style-name="P9"><text:span text:style-name="T9">Sr. Principal Engineer · Line Financi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1.066cm" svg:height="1.066cm" svg:x="1.27cm" svg:y="5.38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3" draw:text-style-name="P4" draw:layer="layout" svg:width="1.066cm" svg:height="1.066cm" svg:x="1.27cm" svg:y="5.385cm">
          <text:p text:style-name="P3"><text:span text:style-name="T10">💼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0" draw:layer="layout" svg:width="13.461cm" svg:height="1.726cm" svg:x="2.667cm" svg:y="5.436cm">
          <text:p text:style-name="P9"><text:span text:style-name="T11">Leading development at Line Financi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" draw:text-style-name="P2" draw:layer="layout" svg:width="1.066cm" svg:height="1.066cm" svg:x="1.27cm" svg:y="7.41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15" draw:text-style-name="P4" draw:layer="layout" svg:width="1.066cm" svg:height="1.066cm" svg:x="1.27cm" svg:y="7.417cm">
          <text:p text:style-name="P3"><text:span text:style-name="T10">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6" draw:text-style-name="P10" draw:layer="layout" svg:width="13.461cm" svg:height="1.726cm" svg:x="2.667cm" svg:y="7.468cm">
          <text:p text:style-name="P9"><text:span text:style-name="T11">M.Sc. Data Science &amp; AI (ongoing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" draw:text-style-name="P2" draw:layer="layout" svg:width="1.066cm" svg:height="1.066cm" svg:x="1.27cm" svg:y="9.44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7" draw:text-style-name="P4" draw:layer="layout" svg:width="1.066cm" svg:height="1.066cm" svg:x="1.27cm" svg:y="9.449cm">
          <text:p text:style-name="P3"><text:span text:style-name="T10">🔬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8" draw:text-style-name="P10" draw:layer="layout" svg:width="13.461cm" svg:height="1.726cm" svg:x="2.667cm" svg:y="9.5cm">
          <text:p text:style-name="P9"><text:span text:style-name="T11">Building Ghilli — open-source grapheme-aware</text:span></text:p>
          <text:p text:style-name="P9"><text:span text:style-name="T11">tokenizer for Indian Abugida scrip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" draw:text-style-name="P2" draw:layer="layout" svg:width="1.066cm" svg:height="1.066cm" svg:x="1.27cm" svg:y="11.48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19" draw:text-style-name="P4" draw:layer="layout" svg:width="1.066cm" svg:height="1.066cm" svg:x="1.27cm" svg:y="11.481cm">
          <text:p text:style-name="P3"><text:span text:style-name="T10">🎙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0" draw:text-style-name="P10" draw:layer="layout" svg:width="13.461cm" svg:height="1.726cm" svg:x="2.667cm" svg:y="11.532cm">
          <text:p text:style-name="P9"><text:span text:style-name="T11">Open source contributor &amp; public speaker</text:span></text:p>
          <text:p text:style-name="P9"><text:span text:style-name="T11">in Tamil-speaking tech communit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" draw:text-style-name="P1" draw:layer="layout" svg:width="5.968cm" svg:height="9.143cm" svg:x="18.034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425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Image 0" draw:style-name="gr21" draw:text-style-name="P11" draw:layer="layout" svg:width="5.206cm" svg:height="5.206cm" svg:x="18.415cm" svg:y="3.048cm">
          <draw:image xlink:href="Pictures/100000000000012C0000012C2C86F56C.png" xlink:type="simple" xlink:show="embed" xlink:actuate="onLoad" draw:mime-type="image/png">
            <text:p/>
          </draw:image>
          <svg:desc>preencoded.png</svg:desc>
        </draw:frame>
        <draw:custom-shape draw:name="Shape 18" draw:style-name="gr22" draw:text-style-name="P12" draw:layer="layout" svg:width="5.968cm" svg:height="1.32cm" svg:x="18.034cm" svg:y="8.382cm">
          <text:p/>
          <draw:enhanced-geometry draw:mirror-horizontal="false" draw:mirror-vertical="false" draw:glue-points="?f8 0 0 ?f9 ?f8 ?f10 ?f11 ?f9" draw:text-areas="?f5 ?f5 ?f6 ?f7" svg:viewBox="0 0 0 0" draw:type="ooxml-roundRect" draw:modifiers="115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9" draw:style-name="gr23" draw:text-style-name="P4" draw:layer="layout" svg:width="5.968cm" svg:height="1.32cm" svg:x="18.034cm" svg:y="8.382cm">
          <text:p text:style-name="P3"><text:span text:style-name="T12">in <text:s/>Connect on Linked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4" draw:text-style-name="P4" draw:layer="layout" svg:width="5.968cm" svg:height="0.812cm" svg:x="18.034cm" svg:y="9.855cm">
          <text:p text:style-name="P3"><text:span text:style-name="T13">linkedin.com/in/manoj-mohan-1374a33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5" draw:text-style-name="P4" draw:layer="layout" svg:width="5.968cm" svg:height="0.71cm" svg:x="18.034cm" svg:y="10.719cm">
          <text:p text:style-name="P3"><text:span text:style-name="T14">Scan to conne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Brief 60-second intro. Let the QR code stay visible. Keep it humble — the talk is about the work, not you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6" draw:text-style-name="P4" draw:layer="layout" svg:width="22.351cm" svg:height="1.523cm" svg:x="1.524cm" svg:y="0.762cm">
          <text:p text:style-name="P3"><text:span text:style-name="T16">A Simple Experi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7" draw:text-style-name="P4" draw:layer="layout" svg:width="22.351cm" svg:height="1.269cm" svg:x="1.524cm" svg:y="2.667cm">
          <text:p text:style-name="P3"><text:span text:style-name="T17">Type <text:s/>"</text:span><text:span text:style-name="T17">தமிழ் மொழி</text:span><text:span text:style-name="T17">" <text:s/>into an AI too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9.397cm" svg:height="4.063cm" svg:x="2.032cm" svg:y="4.369cm">
          <text:p/>
          <draw:enhanced-geometry draw:mirror-horizontal="false" draw:mirror-vertical="false" draw:glue-points="?f8 0 0 ?f9 ?f8 ?f10 ?f11 ?f9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4" draw:style-name="gr28" draw:text-style-name="P4" draw:layer="layout" svg:width="9.397cm" svg:height="2.234cm" svg:x="2.032cm" svg:y="4.674cm">
          <text:p text:style-name="P3"><text:span text:style-name="T18">12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9" draw:text-style-name="P4" draw:layer="layout" svg:width="9.397cm" svg:height="1.421cm" svg:x="2.032cm" svg:y="6.807cm">
          <text:p text:style-name="P3"><text:span text:style-name="T19">tokens <text:s/>· <text:s/>GPT-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0" draw:text-style-name="P15" draw:layer="layout" svg:width="9.397cm" svg:height="4.063cm" svg:x="13.97cm" svg:y="4.369cm">
          <text:p/>
          <draw:enhanced-geometry draw:mirror-horizontal="false" draw:mirror-vertical="false" draw:glue-points="?f8 0 0 ?f9 ?f8 ?f10 ?f11 ?f9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31" draw:text-style-name="P4" draw:layer="layout" svg:width="9.397cm" svg:height="2.234cm" svg:x="13.97cm" svg:y="4.674cm">
          <text:p text:style-name="P3"><text:span text:style-name="T18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2" draw:text-style-name="P4" draw:layer="layout" svg:width="9.397cm" svg:height="1.421cm" svg:x="13.97cm" svg:y="6.807cm">
          <text:p text:style-name="P3"><text:span text:style-name="T19">tokens <text:s/>· <text:s/>Ghil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3" draw:text-style-name="P4" draw:layer="layout" svg:width="2.539cm" svg:height="2.285cm" svg:x="11.43cm" svg:y="5.334cm">
          <text:p text:style-name="P3"><text:span text:style-name="T20">v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4" draw:text-style-name="P4" draw:layer="layout" svg:width="22.351cm" svg:height="1.066cm" svg:x="1.524cm" svg:y="8.941cm">
          <text:p text:style-name="P3"><text:span text:style-name="T21">That is not a minor inefficienc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5" draw:text-style-name="P4" draw:layer="layout" svg:width="21.335cm" svg:height="2.082cm" svg:x="2.032cm" svg:y="10.109cm">
          <text:p text:style-name="P3"><text:span text:style-name="T22">Tamil speakers work with 1/4th the effective context window of English speakers —</text:span></text:p>
          <text:p text:style-name="P3"><text:span text:style-name="T22">not because Tamil is complex, but because the tokenizer was never designed with Tamil in min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Ask the audience first: how many of you have used ChatGPT or any AI tool in Tamil? Then reveal the numbers. Do not explain yet — just let it land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" draw:text-style-name="P10" draw:layer="layout" svg:width="22.859cm" svg:height="1.65cm" svg:x="1.27cm" svg:y="0.635cm">
          <text:p text:style-name="P9"><text:span text:style-name="T7">What Is Tokenisation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7" draw:text-style-name="P10" draw:layer="layout" svg:width="22.859cm" svg:height="1.142cm" svg:x="1.27cm" svg:y="2.743cm">
          <text:p text:style-name="P9"><text:span text:style-name="T23">LLMs do not read text. They read numbers. Tokenisation is the brid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4.063cm" svg:height="1.269cm" svg:x="1.27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38" draw:text-style-name="P4" draw:layer="layout" svg:width="4.063cm" svg:height="1.269cm" svg:x="1.27cm" svg:y="4.267cm">
          <text:p text:style-name="P3"><text:span text:style-name="T24">"Hell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4.063cm" svg:height="1.269cm" svg:x="5.715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39" draw:text-style-name="P4" draw:layer="layout" svg:width="4.063cm" svg:height="1.269cm" svg:x="5.715cm" svg:y="4.267cm">
          <text:p text:style-name="P3"><text:span text:style-name="T24">world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0" draw:text-style-name="P4" draw:layer="layout" svg:width="4.063cm" svg:height="1.269cm" svg:x="10.16cm" svg:y="4.267cm">
          <text:p text:style-name="P3"><text:span text:style-name="T25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4.063cm" svg:height="1.269cm" svg:x="14.605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0" draw:style-name="gr41" draw:text-style-name="P4" draw:layer="layout" svg:width="4.063cm" svg:height="1.269cm" svg:x="14.605cm" svg:y="4.267cm">
          <text:p text:style-name="P3"><text:span text:style-name="T26">[15496,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4.063cm" svg:height="1.269cm" svg:x="19.05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42" draw:text-style-name="P4" draw:layer="layout" svg:width="4.063cm" svg:height="1.269cm" svg:x="19.05cm" svg:y="4.267cm">
          <text:p text:style-name="P3"><text:span text:style-name="T26">995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" draw:text-style-name="P2" draw:layer="layout" svg:width="1.32cm" svg:height="1.32cm" svg:x="1.27cm" svg:y="6.1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43" draw:text-style-name="P4" draw:layer="layout" svg:width="1.32cm" svg:height="1.32cm" svg:x="1.27cm" svg:y="6.147cm">
          <text:p text:style-name="P3"><text:span text:style-name="T27">🔤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4" draw:text-style-name="P10" draw:layer="layout" svg:width="9.143cm" svg:height="0.71cm" svg:x="2.921cm" svg:y="6.198cm">
          <text:p text:style-name="P9"><text:span text:style-name="T28">Tokens are not always full wor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5" draw:text-style-name="P10" draw:layer="layout" svg:width="19.811cm" svg:height="0.659cm" svg:x="2.921cm" svg:y="6.858cm">
          <text:p text:style-name="P9"><text:span text:style-name="T5">They can be subwords, characters, or by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" draw:text-style-name="P2" draw:layer="layout" svg:width="1.32cm" svg:height="1.32cm" svg:x="1.27cm" svg:y="8.38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8" draw:style-name="gr46" draw:text-style-name="P4" draw:layer="layout" svg:width="1.32cm" svg:height="1.32cm" svg:x="1.27cm" svg:y="8.382cm">
          <text:p text:style-name="P3"><text:span text:style-name="T27">🔍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47" draw:text-style-name="P10" draw:layer="layout" svg:width="9.143cm" svg:height="0.71cm" svg:x="2.921cm" svg:y="8.433cm">
          <text:p text:style-name="P9"><text:span text:style-name="T28">The tokenizer is a le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8" draw:text-style-name="P10" draw:layer="layout" svg:width="19.811cm" svg:height="0.659cm" svg:x="2.921cm" svg:y="9.093cm">
          <text:p text:style-name="P9"><text:span text:style-name="T5">If built for English, Tamil looks blurry to the mod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" draw:text-style-name="P2" draw:layer="layout" svg:width="1.32cm" svg:height="1.32cm" svg:x="1.27cm" svg:y="10.61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" draw:style-name="gr49" draw:text-style-name="P4" draw:layer="layout" svg:width="1.32cm" svg:height="1.32cm" svg:x="1.27cm" svg:y="10.617cm">
          <text:p text:style-name="P3"><text:span text:style-name="T27">💸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0" draw:text-style-name="P10" draw:layer="layout" svg:width="9.143cm" svg:height="0.71cm" svg:x="2.921cm" svg:y="10.668cm">
          <text:p text:style-name="P9"><text:span text:style-name="T28">More tokens = more API co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1" draw:text-style-name="P10" draw:layer="layout" svg:width="19.811cm" svg:height="0.659cm" svg:x="2.921cm" svg:y="11.328cm">
          <text:p text:style-name="P9"><text:span text:style-name="T5">Pricing is per token — Tamil users pay more for identical cont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" draw:text-style-name="P10" draw:layer="layout" svg:width="22.351cm" svg:height="1.472cm" svg:x="1.524cm" svg:y="0.635cm">
          <text:p text:style-name="P9"><text:span text:style-name="T16">How Ghilli Was Bor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.32cm" svg:height="1.32cm" svg:x="1.27cm" svg:y="2.4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53" draw:text-style-name="P4" draw:layer="layout" svg:width="1.32cm" svg:height="1.32cm" svg:x="1.27cm" svg:y="2.489cm">
          <text:p text:style-name="P3"><text:span text:style-name="T29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4" draw:text-style-name="P10" draw:layer="layout" svg:width="20.827cm" svg:height="0.685cm" svg:x="2.997cm" svg:y="2.54cm">
          <text:p text:style-name="P9"><text:span text:style-name="T30">Deep dive into LL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5" draw:text-style-name="P10" draw:layer="layout" svg:width="20.827cm" svg:height="0.634cm" svg:x="2.997cm" svg:y="3.175cm">
          <text:p text:style-name="P9"><text:span text:style-name="T31">Exploring how large language models actually work under the hoo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" draw:text-style-name="P2" draw:layer="layout" svg:width="1.32cm" svg:height="1.32cm" svg:x="1.27cm" svg:y="4.67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56" draw:text-style-name="P4" draw:layer="layout" svg:width="1.32cm" svg:height="1.32cm" svg:x="1.27cm" svg:y="4.674cm">
          <text:p text:style-name="P3"><text:span text:style-name="T29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7" draw:text-style-name="P10" draw:layer="layout" svg:width="20.827cm" svg:height="0.685cm" svg:x="2.997cm" svg:y="4.724cm">
          <text:p text:style-name="P9"><text:span text:style-name="T30">TOSSHack '26 problem stat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8" draw:text-style-name="P10" draw:layer="layout" svg:width="20.827cm" svg:height="0.634cm" svg:x="2.997cm" svg:y="5.359cm">
          <text:p text:style-name="P9"><text:span text:style-name="T31">"Build a better tokenizer for Tamil" — I almost scrolled past 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" draw:text-style-name="P2" draw:layer="layout" svg:width="1.32cm" svg:height="1.32cm" svg:x="1.27cm" svg:y="6.85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59" draw:text-style-name="P4" draw:layer="layout" svg:width="1.32cm" svg:height="1.32cm" svg:x="1.27cm" svg:y="6.858cm">
          <text:p text:style-name="P3"><text:span text:style-name="T29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0" draw:text-style-name="P10" draw:layer="layout" svg:width="20.827cm" svg:height="0.685cm" svg:x="2.997cm" svg:y="6.909cm">
          <text:p text:style-name="P9"><text:span text:style-name="T30">Found the COLING 2025 pap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1" draw:text-style-name="P10" draw:layer="layout" svg:width="20.827cm" svg:height="0.634cm" svg:x="2.997cm" svg:y="7.544cm">
          <text:p text:style-name="P9"><text:span text:style-name="T31">Velayuthan &amp; Sarveswaran, University of Jaffna — the root cause was cle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" draw:text-style-name="P2" draw:layer="layout" svg:width="1.32cm" svg:height="1.32cm" svg:x="1.27cm" svg:y="9.04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62" draw:text-style-name="P4" draw:layer="layout" svg:width="1.32cm" svg:height="1.32cm" svg:x="1.27cm" svg:y="9.042cm">
          <text:p text:style-name="P3"><text:span text:style-name="T29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3" draw:text-style-name="P10" draw:layer="layout" svg:width="20.827cm" svg:height="0.685cm" svg:x="2.997cm" svg:y="9.093cm">
          <text:p text:style-name="P9"><text:span text:style-name="T30">No packaged library exis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4" draw:text-style-name="P10" draw:layer="layout" svg:width="20.827cm" svg:height="0.634cm" svg:x="2.997cm" svg:y="9.728cm">
          <text:p text:style-name="P9"><text:span text:style-name="T31">The paper had the insight. Nobody had shipped it as a usable too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" draw:text-style-name="P2" draw:layer="layout" svg:width="1.32cm" svg:height="1.32cm" svg:x="1.27cm" svg:y="11.22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65" draw:text-style-name="P4" draw:layer="layout" svg:width="1.32cm" svg:height="1.32cm" svg:x="1.27cm" svg:y="11.227cm">
          <text:p text:style-name="P3"><text:span text:style-name="T29">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6" draw:text-style-name="P10" draw:layer="layout" svg:width="20.827cm" svg:height="0.685cm" svg:x="2.997cm" svg:y="11.278cm">
          <text:p text:style-name="P9"><text:span text:style-name="T30">The week arriv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7" draw:text-style-name="P10" draw:layer="layout" svg:width="20.827cm" svg:height="0.634cm" svg:x="2.997cm" svg:y="11.913cm">
          <text:p text:style-name="P9"><text:span text:style-name="T31">I wasn't sure I'd attend. Then I thought — what's the worst that happen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Tell this as a personal story. Pause on step 02. The moment of hesitation is the most relatable part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8" draw:text-style-name="P10" draw:layer="layout" svg:width="22.859cm" svg:height="1.65cm" svg:x="1.27cm" svg:y="0.635cm">
          <text:p text:style-name="P9"><text:span text:style-name="T7">Why Tamil Gets a Raw D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9" draw:text-style-name="P10" draw:layer="layout" svg:width="22.859cm" svg:height="1.32cm" svg:x="1.27cm" svg:y="2.667cm">
          <text:p text:style-name="P9"><text:span text:style-name="T32">Tamil uses the Abugida writing system. A single visible character is composed of multiple Unicode codepoin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3.301cm" svg:height="2.539cm" svg:x="1.524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70" draw:text-style-name="P4" draw:layer="layout" svg:width="3.301cm" svg:height="2.539cm" svg:x="1.524cm" svg:y="4.267cm">
          <text:p text:style-name="P3"><text:span text:style-name="T33">க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1" draw:text-style-name="P4" draw:layer="layout" svg:width="3.301cm" svg:height="2.539cm" svg:x="5.461cm" svg:y="4.267cm">
          <text:p text:style-name="P3"><text:span text:style-name="T34">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3.301cm" svg:height="2.539cm" svg:x="9.398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8" draw:style-name="gr72" draw:text-style-name="P4" draw:layer="layout" svg:width="3.301cm" svg:height="2.539cm" svg:x="9.398cm" svg:y="4.267cm">
          <text:p text:style-name="P3"><text:span text:style-name="T33">ா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3" draw:text-style-name="P4" draw:layer="layout" svg:width="3.301cm" svg:height="2.539cm" svg:x="13.335cm" svg:y="4.267cm">
          <text:p text:style-name="P3"><text:span text:style-name="T34">=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3.301cm" svg:height="2.539cm" svg:x="17.272cm" svg:y="4.267cm">
          <text:p/>
          <draw:enhanced-geometry draw:mirror-horizontal="false" draw:mirror-vertical="false" draw:glue-points="?f8 0 0 ?f9 ?f8 ?f10 ?f11 ?f9" draw:text-areas="?f5 ?f5 ?f6 ?f7" svg:viewBox="0 0 0 0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1" draw:style-name="gr74" draw:text-style-name="P4" draw:layer="layout" svg:width="3.301cm" svg:height="2.539cm" svg:x="17.272cm" svg:y="4.267cm">
          <text:p text:style-name="P3"><text:span text:style-name="T33">கா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5" draw:text-style-name="P10" draw:layer="layout" svg:width="21.589cm" svg:height="0.71cm" svg:x="1.524cm" svg:y="6.96cm">
          <text:p text:style-name="P9"><text:span text:style-name="T35">consonant <text:s text:c="2"/>+ <text:s text:c="2"/>vowel modifier <text:s text:c="2"/>= <text:s text:c="2"/>one grapheme (linguistically inseparabl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6" draw:text-style-name="P16" draw:layer="layout" svg:width="22.859cm" svg:height="3.936cm" svg:x="1.27cm" svg:y="7.874cm">
          <text:p/>
          <draw:enhanced-geometry draw:mirror-horizontal="false" draw:mirror-vertical="false" draw:glue-points="?f8 0 0 ?f9 ?f8 ?f10 ?f11 ?f9" draw:text-areas="?f5 ?f5 ?f6 ?f7" svg:viewBox="0 0 0 0" draw:type="ooxml-roundRect" draw:modifiers="516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4" draw:style-name="gr77" draw:text-style-name="P10" draw:layer="layout" svg:width="21.843cm" svg:height="0.812cm" svg:x="1.829cm" svg:y="8.052cm">
          <text:p text:style-name="P9"><text:span text:style-name="T36">The GPT-2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8" draw:text-style-name="P10" draw:layer="layout" svg:width="21.792cm" svg:height="2.666cm" svg:x="1.829cm" svg:y="8.89cm">
          <text:p text:style-name="P9"><text:span text:style-name="T37">GPT-2's regex pre-tokenizer treats Unicode Mark category characters — Tamil vowel signs — as punctuation, and tears them away from their base consonants. </text:span><text:span text:style-name="T37">க </text:span><text:span text:style-name="T37">+</text:span><text:span text:style-name="T37"> ா </text:span><text:span text:style-name="T37">are split into separate tokens, then fragmented further into UTF-8 bytes. The vowel sign cannot stand alone; it is linguistically meaningless without its consonant. This same failure affects Malayalam, Sinhala, Hindi, Kannada, Telugu, Bengali, and Gujarat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Core technical insight. Spend time here. Emphasise this is not a Tamil-only problem — it affects every Abugida script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9" draw:text-style-name="P10" draw:layer="layout" svg:width="22.859cm" svg:height="1.65cm" svg:x="1.27cm" svg:y="0.635cm">
          <text:p text:style-name="P9"><text:span text:style-name="T7">The Impact: Pre-Tokeniser Matters More Than Algorith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0" draw:text-style-name="P10" draw:layer="layout" svg:width="22.859cm" svg:height="1.32cm" svg:x="1.27cm" svg:y="2.667cm">
          <text:p text:style-name="P9"><text:span text:style-name="T32">Switching only the pre-tokeniser — without changing the BPE algorithm — jumps compression ratio from 1.36× to 4.32× for Tami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1" draw:text-style-name="P10" draw:layer="layout" svg:width="12.699cm" svg:height="0.71cm" svg:x="1.27cm" svg:y="4.267cm">
          <text:p text:style-name="P9"><text:span text:style-name="T38">Compression Ratio (higher = bett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2" draw:text-style-name="P4" draw:layer="layout" svg:width="1.777cm" svg:height="0.71cm" svg:x="14.224cm" svg:y="4.267cm">
          <text:p text:style-name="P3"><text:span text:style-name="T38">C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3" draw:text-style-name="P4" draw:layer="layout" svg:width="1.777cm" svg:height="0.71cm" svg:x="16.51cm" svg:y="4.267cm">
          <text:p text:style-name="P3"><text:span text:style-name="T38">T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4" draw:text-style-name="P17" draw:layer="layout" svg:width="12.699cm" svg:height="0.71cm" svg:x="1.27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" draw:text-style-name="P2" draw:layer="layout" svg:width="1.975cm" svg:height="0.71cm" svg:x="1.27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5" draw:text-style-name="P10" draw:layer="layout" svg:width="12.445cm" svg:height="0.659cm" svg:x="1.27cm" svg:y="5.131cm">
          <text:p text:style-name="P9"><text:span text:style-name="T39">GPT-2 pre-tokeniser + BP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6" draw:text-style-name="P4" draw:layer="layout" svg:width="1.904cm" svg:height="0.761cm" svg:x="14.097cm" svg:y="5.232cm">
          <text:p text:style-name="P3"><text:span text:style-name="T40">1.36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7" draw:text-style-name="P4" draw:layer="layout" svg:width="1.904cm" svg:height="0.761cm" svg:x="16.383cm" svg:y="5.232cm">
          <text:p text:style-name="P3"><text:span text:style-name="T5">4.5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4" draw:text-style-name="P17" draw:layer="layout" svg:width="12.699cm" svg:height="0.71cm" svg:x="1.27cm" svg:y="6.9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8" draw:text-style-name="P18" draw:layer="layout" svg:width="3.103cm" svg:height="0.71cm" svg:x="1.27cm" svg:y="6.9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9" draw:text-style-name="P10" draw:layer="layout" svg:width="12.445cm" svg:height="0.659cm" svg:x="1.27cm" svg:y="6.706cm">
          <text:p text:style-name="P9"><text:span text:style-name="T39">GPT-4 / Llama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0" draw:text-style-name="P4" draw:layer="layout" svg:width="1.904cm" svg:height="0.761cm" svg:x="14.097cm" svg:y="6.807cm">
          <text:p text:style-name="P3"><text:span text:style-name="T41">2.13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1" draw:text-style-name="P4" draw:layer="layout" svg:width="1.904cm" svg:height="0.761cm" svg:x="16.383cm" svg:y="6.807cm">
          <text:p text:style-name="P3"><text:span text:style-name="T5">2.8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84" draw:text-style-name="P17" draw:layer="layout" svg:width="12.699cm" svg:height="0.71cm" svg:x="1.27cm" svg:y="8.4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0" draw:text-style-name="P15" draw:layer="layout" svg:width="6.208cm" svg:height="0.71cm" svg:x="1.27cm" svg:y="8.4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2" draw:text-style-name="P10" draw:layer="layout" svg:width="12.445cm" svg:height="0.659cm" svg:x="1.27cm" svg:y="8.28cm">
          <text:p text:style-name="P9"><text:span text:style-name="T39">Whitespace pre-tokeniser + BP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3" draw:text-style-name="P4" draw:layer="layout" svg:width="1.904cm" svg:height="0.761cm" svg:x="14.097cm" svg:y="8.382cm">
          <text:p text:style-name="P3"><text:span text:style-name="T42">4.32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4" draw:text-style-name="P4" draw:layer="layout" svg:width="1.904cm" svg:height="0.761cm" svg:x="16.383cm" svg:y="8.382cm">
          <text:p text:style-name="P3"><text:span text:style-name="T5">0.7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4" draw:text-style-name="P17" draw:layer="layout" svg:width="12.699cm" svg:height="0.71cm" svg:x="1.27cm" svg:y="10.0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95" draw:text-style-name="P19" draw:layer="layout" svg:width="6.349cm" svg:height="0.71cm" svg:x="1.27cm" svg:y="10.0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96" draw:text-style-name="P10" draw:layer="layout" svg:width="12.445cm" svg:height="0.659cm" svg:x="1.27cm" svg:y="9.855cm">
          <text:p text:style-name="P9"><text:span text:style-name="T39">Ghilli GPE 32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97" draw:text-style-name="P4" draw:layer="layout" svg:width="1.904cm" svg:height="0.761cm" svg:x="14.097cm" svg:y="9.957cm">
          <text:p text:style-name="P3"><text:span text:style-name="T43">4.36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98" draw:text-style-name="P4" draw:layer="layout" svg:width="1.904cm" svg:height="0.761cm" svg:x="16.383cm" svg:y="9.957cm">
          <text:p text:style-name="P3"><text:span text:style-name="T5">~0.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84" draw:text-style-name="P17" draw:layer="layout" svg:width="12.699cm" svg:height="0.71cm" svg:x="1.27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99" draw:text-style-name="P20" draw:layer="layout" svg:width="12.699cm" svg:height="0.71cm" svg:x="1.27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00" draw:text-style-name="P10" draw:layer="layout" svg:width="12.445cm" svg:height="0.659cm" svg:x="1.27cm" svg:y="11.43cm">
          <text:p text:style-name="P9"><text:span text:style-name="T39">mT5 / Gemma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01" draw:text-style-name="P4" draw:layer="layout" svg:width="1.904cm" svg:height="0.761cm" svg:x="14.097cm" svg:y="11.532cm">
          <text:p text:style-name="P3"><text:span text:style-name="T44">9.21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02" draw:text-style-name="P4" draw:layer="layout" svg:width="1.904cm" svg:height="0.761cm" svg:x="16.383cm" svg:y="11.532cm">
          <text:p text:style-name="P3"><text:span text:style-name="T5">0.7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03" draw:text-style-name="P10" draw:layer="layout" svg:width="22.859cm" svg:height="0.71cm" svg:x="1.27cm" svg:y="13.157cm">
          <text:p text:style-name="P9"><text:span text:style-name="T45">TP = Tokenisation Parity vs English (ideal = 1.0, lower = better) <text:s/>· <text:s/>Source: Velayuthan &amp; Sarveswaran, COLING 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Key takeaway: the algorithm choice (BPE vs Unigram vs WordPiece) barely matters. The pre-tokeniser accounts for nearly all the variance. This is the paper's central finding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4" draw:text-style-name="P10" draw:layer="layout" svg:width="22.859cm" svg:height="1.65cm" svg:x="1.27cm" svg:y="0.635cm">
          <text:p text:style-name="P9"><text:span text:style-name="T7">BPE in 60 Seco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5" draw:text-style-name="P10" draw:layer="layout" svg:width="22.859cm" svg:height="0.964cm" svg:x="1.27cm" svg:y="2.667cm">
          <text:p text:style-name="P9"><text:span text:style-name="T23">Byte Pair Encoding — the algorithm behind GPT-2, GPT-4, Llama 3, and Ghil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6" draw:text-style-name="P21" draw:layer="layout" svg:width="10.921cm" svg:height="3.504cm" svg:x="1.27cm" svg:y="4.013cm">
          <text:p/>
          <draw:enhanced-geometry draw:mirror-horizontal="false" draw:mirror-vertical="false" draw:glue-points="?f8 0 0 ?f9 ?f8 ?f10 ?f11 ?f9" draw:text-areas="?f5 ?f5 ?f6 ?f7" svg:viewBox="0 0 0 0" draw:type="ooxml-roundRect" draw:modifiers="57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5" draw:style-name="gr2" draw:text-style-name="P2" draw:layer="layout" svg:width="1.269cm" svg:height="1.269cm" svg:x="1.727cm" svg:y="4.52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07" draw:text-style-name="P4" draw:layer="layout" svg:width="1.269cm" svg:height="1.269cm" svg:x="1.727cm" svg:y="4.521cm">
          <text:p text:style-name="P3"><text:span text:style-name="T46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8" draw:text-style-name="P10" draw:layer="layout" svg:width="8.381cm" svg:height="0.812cm" svg:x="3.353cm" svg:y="4.47cm">
          <text:p text:style-name="P9"><text:span text:style-name="T28">Start with charac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9" draw:text-style-name="P10" draw:layer="layout" svg:width="8.381cm" svg:height="1.396cm" svg:x="3.353cm" svg:y="5.283cm">
          <text:p text:style-name="P9"><text:span text:style-name="T5">Split all text into individual characters (or byte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06" draw:text-style-name="P21" draw:layer="layout" svg:width="10.921cm" svg:height="3.504cm" svg:x="13.208cm" svg:y="4.013cm">
          <text:p/>
          <draw:enhanced-geometry draw:mirror-horizontal="false" draw:mirror-vertical="false" draw:glue-points="?f8 0 0 ?f9 ?f8 ?f10 ?f11 ?f9" draw:text-areas="?f5 ?f5 ?f6 ?f7" svg:viewBox="0 0 0 0" draw:type="ooxml-roundRect" draw:modifiers="57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0" draw:style-name="gr2" draw:text-style-name="P2" draw:layer="layout" svg:width="1.269cm" svg:height="1.269cm" svg:x="13.665cm" svg:y="4.52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110" draw:text-style-name="P4" draw:layer="layout" svg:width="1.269cm" svg:height="1.269cm" svg:x="13.665cm" svg:y="4.521cm">
          <text:p text:style-name="P3"><text:span text:style-name="T46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1" draw:text-style-name="P10" draw:layer="layout" svg:width="8.381cm" svg:height="0.812cm" svg:x="15.291cm" svg:y="4.47cm">
          <text:p text:style-name="P9"><text:span text:style-name="T28">Count pai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2" draw:text-style-name="P10" draw:layer="layout" svg:width="8.381cm" svg:height="1.396cm" svg:x="15.291cm" svg:y="5.283cm">
          <text:p text:style-name="P9"><text:span text:style-name="T5">Find the most frequent adjacent pair in the entire training corp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6" draw:text-style-name="P21" draw:layer="layout" svg:width="10.921cm" svg:height="3.504cm" svg:x="1.27cm" svg:y="7.95cm">
          <text:p/>
          <draw:enhanced-geometry draw:mirror-horizontal="false" draw:mirror-vertical="false" draw:glue-points="?f8 0 0 ?f9 ?f8 ?f10 ?f11 ?f9" draw:text-areas="?f5 ?f5 ?f6 ?f7" svg:viewBox="0 0 0 0" draw:type="ooxml-roundRect" draw:modifiers="57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5" draw:style-name="gr2" draw:text-style-name="P2" draw:layer="layout" svg:width="1.269cm" svg:height="1.269cm" svg:x="1.727cm" svg:y="8.45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13" draw:text-style-name="P4" draw:layer="layout" svg:width="1.269cm" svg:height="1.269cm" svg:x="1.727cm" svg:y="8.458cm">
          <text:p text:style-name="P3"><text:span text:style-name="T4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4" draw:text-style-name="P10" draw:layer="layout" svg:width="8.381cm" svg:height="0.812cm" svg:x="3.353cm" svg:y="8.407cm">
          <text:p text:style-name="P9"><text:span text:style-name="T28">Mer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5" draw:text-style-name="P10" draw:layer="layout" svg:width="8.381cm" svg:height="1.396cm" svg:x="3.353cm" svg:y="9.22cm">
          <text:p text:style-name="P9"><text:span text:style-name="T5">Replace every occurrence of that pair with a new single tok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6" draw:text-style-name="P21" draw:layer="layout" svg:width="10.921cm" svg:height="3.504cm" svg:x="13.208cm" svg:y="7.95cm">
          <text:p/>
          <draw:enhanced-geometry draw:mirror-horizontal="false" draw:mirror-vertical="false" draw:glue-points="?f8 0 0 ?f9 ?f8 ?f10 ?f11 ?f9" draw:text-areas="?f5 ?f5 ?f6 ?f7" svg:viewBox="0 0 0 0" draw:type="ooxml-roundRect" draw:modifiers="57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20" draw:style-name="gr2" draw:text-style-name="P2" draw:layer="layout" svg:width="1.269cm" svg:height="1.269cm" svg:x="13.665cm" svg:y="8.45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116" draw:text-style-name="P4" draw:layer="layout" svg:width="1.269cm" svg:height="1.269cm" svg:x="13.665cm" svg:y="8.458cm">
          <text:p text:style-name="P3"><text:span text:style-name="T46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17" draw:text-style-name="P10" draw:layer="layout" svg:width="8.381cm" svg:height="0.812cm" svg:x="15.291cm" svg:y="8.407cm">
          <text:p text:style-name="P9"><text:span text:style-name="T28">Repe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8" draw:text-style-name="P10" draw:layer="layout" svg:width="8.381cm" svg:height="1.396cm" svg:x="15.291cm" svg:y="9.22cm">
          <text:p text:style-name="P9"><text:span text:style-name="T5">Keep merging until you reach your target vocabulary siz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9" draw:text-style-name="P4" draw:layer="layout" svg:width="22.859cm" svg:height="1.066cm" svg:x="1.27cm" svg:y="12.319cm">
          <text:p text:style-name="P3"><text:span text:style-name="T36">Ghilli uses GPE — Grapheme Pair Encoding — BPE seeded with grapheme clusters as atomic units instead of by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0" draw:text-style-name="P10" draw:layer="layout" svg:width="22.859cm" svg:height="1.65cm" svg:x="1.27cm" svg:y="0.635cm">
          <text:p text:style-name="P9"><text:span text:style-name="T7">How Ghilli Is Buil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6" draw:text-style-name="P21" draw:layer="layout" svg:width="7.365cm" svg:height="10.54cm" svg:x="1.016cm" svg:y="2.743cm">
          <text:p/>
          <draw:enhanced-geometry draw:mirror-horizontal="false" draw:mirror-vertical="false" draw:glue-points="?f8 0 0 ?f9 ?f8 ?f10 ?f11 ?f9" draw:text-areas="?f5 ?f5 ?f6 ?f7" svg:viewBox="0 0 0 0" draw:type="ooxml-roundRect" draw:modifiers="27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4" draw:style-name="gr2" draw:text-style-name="P2" draw:layer="layout" svg:width="7.365cm" svg:height="1.117cm" svg:x="1.016cm" svg:y="2.7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1" draw:text-style-name="P4" draw:layer="layout" svg:width="7.365cm" svg:height="1.117cm" svg:x="1.016cm" svg:y="2.743cm">
          <text:p text:style-name="P3"><text:span text:style-name="T47">The Fix — GP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2" draw:text-style-name="P10" draw:layer="layout" svg:width="6.755cm" svg:height="1.777cm" svg:x="1.321cm" svg:y="4.191cm">
          <text:p text:style-name="P9"><text:span text:style-name="T39">▸ <text:s/>Use grapheme clusters as atomic uni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3" draw:text-style-name="P10" draw:layer="layout" svg:width="6.755cm" svg:height="1.777cm" svg:x="1.321cm" svg:y="6.172cm">
          <text:p text:style-name="P9"><text:span text:style-name="T39">▸ <text:s/>grapheme.graphemes() keeps vowel signs attached to consona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4" draw:text-style-name="P10" draw:layer="layout" svg:width="6.755cm" svg:height="1.777cm" svg:x="1.321cm" svg:y="8.153cm">
          <text:p text:style-name="P9"><text:span text:style-name="T39">▸ <text:s/>Seed BPE vocabulary with all unique graphemes from the corp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5" draw:text-style-name="P10" draw:layer="layout" svg:width="6.755cm" svg:height="1.777cm" svg:x="1.321cm" svg:y="10.135cm">
          <text:p text:style-name="P9"><text:span text:style-name="T39">▸ <text:s/>Whitespace pre-tokeniser — not GPT-2 rege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06" draw:text-style-name="P21" draw:layer="layout" svg:width="7.365cm" svg:height="10.54cm" svg:x="8.839cm" svg:y="2.743cm">
          <text:p/>
          <draw:enhanced-geometry draw:mirror-horizontal="false" draw:mirror-vertical="false" draw:glue-points="?f8 0 0 ?f9 ?f8 ?f10 ?f11 ?f9" draw:text-areas="?f5 ?f5 ?f6 ?f7" svg:viewBox="0 0 0 0" draw:type="ooxml-roundRect" draw:modifiers="27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1" draw:style-name="gr95" draw:text-style-name="P19" draw:layer="layout" svg:width="7.365cm" svg:height="1.117cm" svg:x="8.839cm" svg:y="2.7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6" draw:text-style-name="P4" draw:layer="layout" svg:width="7.365cm" svg:height="1.117cm" svg:x="8.839cm" svg:y="2.743cm">
          <text:p text:style-name="P3"><text:span text:style-name="T47">Training D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7" draw:text-style-name="P10" draw:layer="layout" svg:width="6.755cm" svg:height="1.777cm" svg:x="9.144cm" svg:y="4.191cm">
          <text:p text:style-name="P9"><text:span text:style-name="T39">▸ <text:s/>Samanantar dataset (AI4Bhara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28" draw:text-style-name="P10" draw:layer="layout" svg:width="6.755cm" svg:height="1.777cm" svg:x="9.144cm" svg:y="6.172cm">
          <text:p text:style-name="P9"><text:span text:style-name="T39">▸ <text:s/>5 million Tamil sentence pai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29" draw:text-style-name="P10" draw:layer="layout" svg:width="6.755cm" svg:height="1.777cm" svg:x="9.144cm" svg:y="8.153cm">
          <text:p text:style-name="P9"><text:span text:style-name="T39">▸ <text:s/>Unicode NFC normalised + deduplica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0" draw:text-style-name="P10" draw:layer="layout" svg:width="6.755cm" svg:height="1.777cm" svg:x="9.144cm" svg:y="10.135cm">
          <text:p text:style-name="P9"><text:span text:style-name="T39">▸ <text:s/>FLORES+ devtest reserved for evaluation — never trained 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6" draw:text-style-name="P21" draw:layer="layout" svg:width="7.365cm" svg:height="10.54cm" svg:x="16.662cm" svg:y="2.743cm">
          <text:p/>
          <draw:enhanced-geometry draw:mirror-horizontal="false" draw:mirror-vertical="false" draw:glue-points="?f8 0 0 ?f9 ?f8 ?f10 ?f11 ?f9" draw:text-areas="?f5 ?f5 ?f6 ?f7" svg:viewBox="0 0 0 0" draw:type="ooxml-roundRect" draw:modifiers="27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8" draw:style-name="gr30" draw:text-style-name="P15" draw:layer="layout" svg:width="7.365cm" svg:height="1.117cm" svg:x="16.662cm" svg:y="2.7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1" draw:text-style-name="P4" draw:layer="layout" svg:width="7.365cm" svg:height="1.117cm" svg:x="16.662cm" svg:y="2.743cm">
          <text:p text:style-name="P3"><text:span text:style-name="T47">Pipe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32" draw:text-style-name="P10" draw:layer="layout" svg:width="6.755cm" svg:height="1.777cm" svg:x="16.967cm" svg:y="4.191cm">
          <text:p text:style-name="P9"><text:span text:style-name="T39">▸ <text:s/>config.yaml driven — no hardcoded valu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33" draw:text-style-name="P10" draw:layer="layout" svg:width="6.755cm" svg:height="1.777cm" svg:x="16.967cm" svg:y="6.172cm">
          <text:p text:style-name="P9"><text:span text:style-name="T39">▸ <text:s/>Single entry point: python pipeline.py --langs 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34" draw:text-style-name="P10" draw:layer="layout" svg:width="6.755cm" svg:height="1.777cm" svg:x="16.967cm" svg:y="8.153cm">
          <text:p text:style-name="P9"><text:span text:style-name="T39">▸ <text:s/>Resumable — skips already-completed stag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5" draw:text-style-name="P10" draw:layer="layout" svg:width="6.755cm" svg:height="1.777cm" svg:x="16.967cm" svg:y="10.135cm">
          <text:p text:style-name="P9"><text:span text:style-name="T39">▸ <text:s/>Trained on M1 Pro MacBook in under 20 minu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Keep this to 3 minutes. The audience wants the demo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6" draw:text-style-name="P4" draw:layer="layout" svg:width="5.079cm" svg:height="3.047cm" svg:x="10.16cm" svg:y="1.905cm">
          <text:p text:style-name="P3"><text:span text:style-name="T48">🎮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7" draw:text-style-name="P4" draw:layer="layout" svg:width="22.351cm" svg:height="2.031cm" svg:x="1.524cm" svg:y="5.08cm">
          <text:p text:style-name="P3"><text:span text:style-name="T49">Live Dem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8" draw:text-style-name="P4" draw:layer="layout" svg:width="22.351cm" svg:height="1.218cm" svg:x="1.524cm" svg:y="7.315cm">
          <text:p text:style-name="P3"><text:span text:style-name="T50">ghilli-tokenizer.streamlit.ap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39" draw:text-style-name="P22" draw:layer="layout" svg:width="17.779cm" svg:height="1.066cm" svg:x="3.81cm" svg:y="9.017cm">
          <text:p/>
          <draw:enhanced-geometry draw:mirror-horizontal="false" draw:mirror-vertical="false" draw:glue-points="?f8 0 0 ?f9 ?f8 ?f10 ?f11 ?f9" draw:text-areas="?f5 ?f5 ?f6 ?f7" svg:viewBox="0 0 0 0" draw:type="ooxml-roundRect" draw:modifiers="14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140" draw:text-style-name="P10" draw:layer="layout" svg:width="17.271cm" svg:height="0.964cm" svg:x="4.064cm" svg:y="9.068cm">
          <text:p text:style-name="P9"><text:span text:style-name="T51">▸ <text:s/>வணக்கம் நண்பா</text:span><text:span text:style-name="T51">, </text:span><text:span text:style-name="T51">எப்படி இருக்கீங்க</text:span><text:span text:style-name="T51">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9" draw:text-style-name="P22" draw:layer="layout" svg:width="17.779cm" svg:height="1.066cm" svg:x="3.81cm" svg:y="10.338cm">
          <text:p/>
          <draw:enhanced-geometry draw:mirror-horizontal="false" draw:mirror-vertical="false" draw:glue-points="?f8 0 0 ?f9 ?f8 ?f10 ?f11 ?f9" draw:text-areas="?f5 ?f5 ?f6 ?f7" svg:viewBox="0 0 0 0" draw:type="ooxml-roundRect" draw:modifiers="14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141" draw:text-style-name="P10" draw:layer="layout" svg:width="17.271cm" svg:height="0.964cm" svg:x="4.064cm" svg:y="10.389cm">
          <text:p text:style-name="P9"><text:span text:style-name="T51">▸ <text:s/>வீடுகளிலிருந்து <text:s/>— </text:span><text:span text:style-name="T51">agglutinative Tamil wo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39" draw:text-style-name="P22" draw:layer="layout" svg:width="17.779cm" svg:height="1.066cm" svg:x="3.81cm" svg:y="11.659cm">
          <text:p/>
          <draw:enhanced-geometry draw:mirror-horizontal="false" draw:mirror-vertical="false" draw:glue-points="?f8 0 0 ?f9 ?f8 ?f10 ?f11 ?f9" draw:text-areas="?f5 ?f5 ?f6 ?f7" svg:viewBox="0 0 0 0" draw:type="ooxml-roundRect" draw:modifiers="14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142" draw:text-style-name="P10" draw:layer="layout" svg:width="17.271cm" svg:height="0.964cm" svg:x="4.064cm" svg:y="11.709cm">
          <text:p text:style-name="P9"><text:span text:style-name="T51">▸ <text:s/>Tamizh NLP works better with better tokeniz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Have a screen recording as backup if internet is unreliable. Spend 5 minutes here. Let the audience see the difference live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3" draw:text-style-name="P10" draw:layer="layout" svg:width="22.859cm" svg:height="1.65cm" svg:x="1.27cm" svg:y="0.635cm">
          <text:p text:style-name="P9"><text:span text:style-name="T7">Benchmark Resul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4" draw:text-style-name="P10" draw:layer="layout" svg:width="22.859cm" svg:height="0.888cm" svg:x="1.27cm" svg:y="2.667cm">
          <text:p text:style-name="P9"><text:span text:style-name="T52">Evaluated on FLORES+ Tamil devtest <text:s/>· <text:s/>Vocabulary size 32k <text:s/>· <text:s/>Trained on 5 million Samanantar senten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5.46cm" svg:height="0.964cm" svg:x="1.27cm" svg:y="3.8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5" draw:text-style-name="P4" draw:layer="layout" svg:width="5.46cm" svg:height="0.964cm" svg:x="1.27cm" svg:y="3.861cm">
          <text:p text:style-name="P3"><text:span text:style-name="T53">Tokeniz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4.952cm" svg:height="0.964cm" svg:x="6.985cm" svg:y="3.8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6" draw:text-style-name="P4" draw:layer="layout" svg:width="4.952cm" svg:height="0.964cm" svg:x="6.985cm" svg:y="3.861cm">
          <text:p text:style-name="P3"><text:span text:style-name="T53">Compression Rat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5.206cm" svg:height="0.964cm" svg:x="12.192cm" svg:y="3.8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7" draw:text-style-name="P4" draw:layer="layout" svg:width="5.206cm" svg:height="0.964cm" svg:x="12.192cm" svg:y="3.861cm">
          <text:p text:style-name="P3"><text:span text:style-name="T53">Tokenisation Pa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7.746cm" svg:height="0.964cm" svg:x="17.653cm" svg:y="3.8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8" draw:text-style-name="P4" draw:layer="layout" svg:width="7.746cm" svg:height="0.964cm" svg:x="17.653cm" svg:y="3.861cm">
          <text:p text:style-name="P3"><text:span text:style-name="T53">No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6" draw:text-style-name="P21" draw:layer="layout" svg:width="5.46cm" svg:height="1.218cm" svg:x="1.27cm" svg:y="5.0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9" draw:text-style-name="P4" draw:layer="layout" svg:width="5.46cm" svg:height="1.218cm" svg:x="1.27cm" svg:y="5.004cm">
          <text:p text:style-name="P3"><text:span text:style-name="T11">GPT-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6" draw:text-style-name="P21" draw:layer="layout" svg:width="4.952cm" svg:height="1.218cm" svg:x="6.985cm" svg:y="5.0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0" draw:text-style-name="P4" draw:layer="layout" svg:width="4.952cm" svg:height="1.218cm" svg:x="6.985cm" svg:y="5.004cm">
          <text:p text:style-name="P3"><text:span text:style-name="T11">1.36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6" draw:text-style-name="P21" draw:layer="layout" svg:width="5.206cm" svg:height="1.218cm" svg:x="12.192cm" svg:y="5.0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51" draw:text-style-name="P4" draw:layer="layout" svg:width="5.206cm" svg:height="1.218cm" svg:x="12.192cm" svg:y="5.004cm">
          <text:p text:style-name="P3"><text:span text:style-name="T11">4.5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6" draw:text-style-name="P21" draw:layer="layout" svg:width="7.746cm" svg:height="1.218cm" svg:x="17.653cm" svg:y="5.0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2" draw:text-style-name="P4" draw:layer="layout" svg:width="7.746cm" svg:height="1.218cm" svg:x="17.653cm" svg:y="5.004cm">
          <text:p text:style-name="P3"><text:span text:style-name="T11">Worst — regex tears Tamil apa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8" draw:layer="layout" svg:width="5.46cm" svg:height="1.218cm" svg:x="1.27cm" svg:y="6.4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3" draw:text-style-name="P4" draw:layer="layout" svg:width="5.46cm" svg:height="1.218cm" svg:x="1.27cm" svg:y="6.401cm">
          <text:p text:style-name="P3"><text:span text:style-name="T11">GPT-4 / Llama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9" draw:text-style-name="P8" draw:layer="layout" svg:width="4.952cm" svg:height="1.218cm" svg:x="6.985cm" svg:y="6.4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4" draw:text-style-name="P4" draw:layer="layout" svg:width="4.952cm" svg:height="1.218cm" svg:x="6.985cm" svg:y="6.401cm">
          <text:p text:style-name="P3"><text:span text:style-name="T11">2.13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9" draw:text-style-name="P8" draw:layer="layout" svg:width="5.206cm" svg:height="1.218cm" svg:x="12.192cm" svg:y="6.4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55" draw:text-style-name="P4" draw:layer="layout" svg:width="5.206cm" svg:height="1.218cm" svg:x="12.192cm" svg:y="6.401cm">
          <text:p text:style-name="P3"><text:span text:style-name="T11">2.8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9" draw:text-style-name="P8" draw:layer="layout" svg:width="7.746cm" svg:height="1.218cm" svg:x="17.653cm" svg:y="6.4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56" draw:text-style-name="P4" draw:layer="layout" svg:width="7.746cm" svg:height="1.218cm" svg:x="17.653cm" svg:y="6.401cm">
          <text:p text:style-name="P3"><text:span text:style-name="T11">Better regex, still English-centr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30" draw:text-style-name="P15" draw:layer="layout" svg:width="5.46cm" svg:height="1.218cm" svg:x="1.27cm" svg:y="7.7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57" draw:text-style-name="P4" draw:layer="layout" svg:width="5.46cm" svg:height="1.218cm" svg:x="1.27cm" svg:y="7.798cm">
          <text:p text:style-name="P3"><text:span text:style-name="T54">Ghilli GPE 32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30" draw:text-style-name="P15" draw:layer="layout" svg:width="4.952cm" svg:height="1.218cm" svg:x="6.985cm" svg:y="7.7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58" draw:text-style-name="P4" draw:layer="layout" svg:width="4.952cm" svg:height="1.218cm" svg:x="6.985cm" svg:y="7.798cm">
          <text:p text:style-name="P3"><text:span text:style-name="T54">4.36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30" draw:text-style-name="P15" draw:layer="layout" svg:width="5.206cm" svg:height="1.218cm" svg:x="12.192cm" svg:y="7.7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59" draw:text-style-name="P4" draw:layer="layout" svg:width="5.206cm" svg:height="1.218cm" svg:x="12.192cm" svg:y="7.798cm">
          <text:p text:style-name="P3"><text:span text:style-name="T54">~0.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30" draw:text-style-name="P15" draw:layer="layout" svg:width="7.746cm" svg:height="1.218cm" svg:x="17.653cm" svg:y="7.7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60" draw:text-style-name="P4" draw:layer="layout" svg:width="7.746cm" svg:height="1.218cm" svg:x="17.653cm" svg:y="7.798cm">
          <text:p text:style-name="P3"><text:span text:style-name="T54">Tamil-first, standalone library 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9" draw:text-style-name="P8" draw:layer="layout" svg:width="5.46cm" svg:height="1.218cm" svg:x="1.27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1" draw:text-style-name="P4" draw:layer="layout" svg:width="5.46cm" svg:height="1.218cm" svg:x="1.27cm" svg:y="9.195cm">
          <text:p text:style-name="P3"><text:span text:style-name="T11">mT5 / Gemma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8" draw:layer="layout" svg:width="4.952cm" svg:height="1.218cm" svg:x="6.985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62" draw:text-style-name="P4" draw:layer="layout" svg:width="4.952cm" svg:height="1.218cm" svg:x="6.985cm" svg:y="9.195cm">
          <text:p text:style-name="P3"><text:span text:style-name="T11">9.21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8" draw:layer="layout" svg:width="5.206cm" svg:height="1.218cm" svg:x="12.192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63" draw:text-style-name="P4" draw:layer="layout" svg:width="5.206cm" svg:height="1.218cm" svg:x="12.192cm" svg:y="9.195cm">
          <text:p text:style-name="P3"><text:span text:style-name="T11">0.7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8" draw:layer="layout" svg:width="7.746cm" svg:height="1.218cm" svg:x="17.653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64" draw:text-style-name="P4" draw:layer="layout" svg:width="7.746cm" svg:height="1.218cm" svg:x="17.653cm" svg:y="9.195cm">
          <text:p text:style-name="P3"><text:span text:style-name="T11">Large multilingual vocabula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65" draw:text-style-name="P10" draw:layer="layout" svg:width="22.859cm" svg:height="2.412cm" svg:x="1.27cm" svg:y="10.795cm">
          <text:p text:style-name="P9"><text:span text:style-name="T55">Ghilli beats GPT-2 by 3.2× and Llama 3 by 2× on Tamil compression.</text:span></text:p>
          <text:p text:style-name="P9"><text:span text:style-name="T55">It does not claim to beat mT5 — mT5 has a massive multilingual vocabulary trained across 100+ languages.</text:span></text:p>
          <text:p text:style-name="P9"><text:span text:style-name="T55">Ghilli's value is being a standalone, Tamil-first, pip-installable, open-source library with reproducible benchmar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Be honest here. Ghilli is not the highest number in the table — and that is fine. Explain why the comparison with mT5 is not apples-to-apples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9" draw:text-style-name="P8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6" draw:text-style-name="P10" draw:layer="layout" svg:width="22.859cm" svg:height="1.65cm" svg:x="1.27cm" svg:y="0.635cm">
          <text:p text:style-name="P9"><text:span text:style-name="T7">What's N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2.859cm" svg:height="0.075cm" svg:x="1.27cm" svg:y="2.4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7" draw:text-style-name="P10" draw:layer="layout" svg:width="22.859cm" svg:height="1.218cm" svg:x="1.27cm" svg:y="2.667cm">
          <text:p text:style-name="P9"><text:span text:style-name="T23">Ghilli v0.1 is Tamil only. The architecture is script-agnostic — the same pipeline runs for every Indian Abugida scrip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6" draw:text-style-name="P21" draw:layer="layout" svg:width="7.365cm" svg:height="8.686cm" svg:x="1.016cm" svg:y="4.191cm">
          <text:p/>
          <draw:enhanced-geometry draw:mirror-horizontal="false" draw:mirror-vertical="false" draw:glue-points="?f8 0 0 ?f9 ?f8 ?f10 ?f11 ?f9" draw:text-areas="?f5 ?f5 ?f6 ?f7" svg:viewBox="0 0 0 0" draw:type="ooxml-roundRect" draw:modifiers="27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5" draw:style-name="gr2" draw:text-style-name="P2" draw:layer="layout" svg:width="7.365cm" svg:height="1.066cm" svg:x="1.016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8" draw:text-style-name="P4" draw:layer="layout" svg:width="7.365cm" svg:height="1.066cm" svg:x="1.016cm" svg:y="4.191cm">
          <text:p text:style-name="P3"><text:span text:style-name="T56">N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9" draw:text-style-name="P10" draw:layer="layout" svg:width="6.603cm" svg:height="1.65cm" svg:x="1.397cm" svg:y="5.537cm">
          <text:p text:style-name="P9"><text:span text:style-name="T39">✓ <text:s/>pip install ghil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0" draw:text-style-name="P10" draw:layer="layout" svg:width="6.603cm" svg:height="1.65cm" svg:x="1.397cm" svg:y="7.366cm">
          <text:p text:style-name="P9"><text:span text:style-name="T39">✓ <text:s/>BPE + Unigram — Tamil 32k weigh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1" draw:text-style-name="P10" draw:layer="layout" svg:width="6.603cm" svg:height="1.65cm" svg:x="1.397cm" svg:y="9.195cm">
          <text:p text:style-name="P9"><text:span text:style-name="T39">✓ <text:s/>Live playgrou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2" draw:text-style-name="P10" draw:layer="layout" svg:width="6.603cm" svg:height="1.65cm" svg:x="1.397cm" svg:y="11.024cm">
          <text:p text:style-name="P9"><text:span text:style-name="T39">✓ <text:s/>Apache 2.0 open sour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6" draw:text-style-name="P21" draw:layer="layout" svg:width="7.365cm" svg:height="8.686cm" svg:x="8.89cm" svg:y="4.191cm">
          <text:p/>
          <draw:enhanced-geometry draw:mirror-horizontal="false" draw:mirror-vertical="false" draw:glue-points="?f8 0 0 ?f9 ?f8 ?f10 ?f11 ?f9" draw:text-areas="?f5 ?f5 ?f6 ?f7" svg:viewBox="0 0 0 0" draw:type="ooxml-roundRect" draw:modifiers="27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2" draw:style-name="gr95" draw:text-style-name="P19" draw:layer="layout" svg:width="7.365cm" svg:height="1.066cm" svg:x="8.89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3" draw:text-style-name="P4" draw:layer="layout" svg:width="7.365cm" svg:height="1.066cm" svg:x="8.89cm" svg:y="4.191cm">
          <text:p text:style-name="P3"><text:span text:style-name="T56">v0.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4" draw:text-style-name="P10" draw:layer="layout" svg:width="6.603cm" svg:height="1.65cm" svg:x="9.271cm" svg:y="5.537cm">
          <text:p text:style-name="P9"><text:span text:style-name="T39">✓ <text:s/>Malayalam, Hindi, Sinhal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5" draw:text-style-name="P10" draw:layer="layout" svg:width="6.603cm" svg:height="1.65cm" svg:x="9.271cm" svg:y="7.366cm">
          <text:p text:style-name="P9"><text:span text:style-name="T39">✓ <text:s/>Kannada, Telugu, Bengali, Gujarat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76" draw:text-style-name="P10" draw:layer="layout" svg:width="6.603cm" svg:height="1.65cm" svg:x="9.271cm" svg:y="9.195cm">
          <text:p text:style-name="P9"><text:span text:style-name="T39">✓ <text:s/>Morpheme alignment benchmar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77" draw:text-style-name="P10" draw:layer="layout" svg:width="6.603cm" svg:height="1.65cm" svg:x="9.271cm" svg:y="11.024cm">
          <text:p text:style-name="P9"><text:span text:style-name="T39">✓ <text:s/>HuggingFace Hub weigh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6" draw:text-style-name="P21" draw:layer="layout" svg:width="7.365cm" svg:height="8.686cm" svg:x="16.764cm" svg:y="4.191cm">
          <text:p/>
          <draw:enhanced-geometry draw:mirror-horizontal="false" draw:mirror-vertical="false" draw:glue-points="?f8 0 0 ?f9 ?f8 ?f10 ?f11 ?f9" draw:text-areas="?f5 ?f5 ?f6 ?f7" svg:viewBox="0 0 0 0" draw:type="ooxml-roundRect" draw:modifiers="275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Shape 19" draw:style-name="gr30" draw:text-style-name="P15" draw:layer="layout" svg:width="7.365cm" svg:height="1.066cm" svg:x="16.764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78" draw:text-style-name="P4" draw:layer="layout" svg:width="7.365cm" svg:height="1.066cm" svg:x="16.764cm" svg:y="4.191cm">
          <text:p text:style-name="P3"><text:span text:style-name="T56">v1.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79" draw:text-style-name="P10" draw:layer="layout" svg:width="6.603cm" svg:height="1.65cm" svg:x="17.145cm" svg:y="5.537cm">
          <text:p text:style-name="P9"><text:span text:style-name="T39">✓ <text:s/>All 22 scheduled Indian languag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80" draw:text-style-name="P10" draw:layer="layout" svg:width="6.603cm" svg:height="1.65cm" svg:x="17.145cm" svg:y="7.366cm">
          <text:p text:style-name="P9"><text:span text:style-name="T39">✓ <text:s/>Multilingual single tokeniz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81" draw:text-style-name="P10" draw:layer="layout" svg:width="6.603cm" svg:height="1.65cm" svg:x="17.145cm" svg:y="9.195cm">
          <text:p text:style-name="P9"><text:span text:style-name="T39">✓ <text:s/>Live benchmark leaderboa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82" draw:text-style-name="P10" draw:layer="layout" svg:width="6.603cm" svg:height="1.65cm" svg:x="17.145cm" svg:y="11.024cm">
          <text:p text:style-name="P9"><text:span text:style-name="T39">✓ <text:s/>LLM fine-tuning gui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83" draw:text-style-name="P4" draw:layer="layout" svg:width="22.859cm" svg:height="0.964cm" svg:x="1.27cm" svg:y="13.081cm">
          <text:p text:style-name="P3"><text:span text:style-name="T57">Every Indian language deserves a tokenizer built for how it actually wor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4" draw:text-style-name="P4" draw:layer="layout" svg:width="22.351cm" svg:height="3.428cm" svg:x="1.524cm" svg:y="0.889cm">
          <text:p text:style-name="P3"><text:span text:style-name="T58">We started with Tamil.</text:span></text:p>
          <text:p text:style-name="P3"><text:span text:style-name="T58">We will not stop the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9" draw:text-style-name="P22" draw:layer="layout" svg:width="22.351cm" svg:height="1.574cm" svg:x="1.524cm" svg:y="4.826cm">
          <text:p/>
          <draw:enhanced-geometry draw:mirror-horizontal="false" draw:mirror-vertical="false" draw:glue-points="?f8 0 0 ?f9 ?f8 ?f10 ?f11 ?f9" draw:text-areas="?f5 ?f5 ?f6 ?f7" svg:viewBox="0 0 0 0" draw:type="ooxml-roundRect" draw:modifiers="1129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" draw:style-name="gr185" draw:text-style-name="P10" draw:layer="layout" svg:width="21.335cm" svg:height="1.396cm" svg:x="2.032cm" svg:y="4.902cm">
          <text:p text:style-name="P9"><text:span text:style-name="T22">📦 <text:s/>pip install ghil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39" draw:text-style-name="P22" draw:layer="layout" svg:width="22.351cm" svg:height="1.574cm" svg:x="1.524cm" svg:y="6.706cm">
          <text:p/>
          <draw:enhanced-geometry draw:mirror-horizontal="false" draw:mirror-vertical="false" draw:glue-points="?f8 0 0 ?f9 ?f8 ?f10 ?f11 ?f9" draw:text-areas="?f5 ?f5 ?f6 ?f7" svg:viewBox="0 0 0 0" draw:type="ooxml-roundRect" draw:modifiers="1129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186" draw:text-style-name="P10" draw:layer="layout" svg:width="21.335cm" svg:height="1.396cm" svg:x="2.032cm" svg:y="6.782cm">
          <text:p text:style-name="P9"><text:span text:style-name="T22">⭐ <text:s/>github.com/manoj-makkuboy/ghilli-tokeniz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9" draw:text-style-name="P22" draw:layer="layout" svg:width="22.351cm" svg:height="1.574cm" svg:x="1.524cm" svg:y="8.585cm">
          <text:p/>
          <draw:enhanced-geometry draw:mirror-horizontal="false" draw:mirror-vertical="false" draw:glue-points="?f8 0 0 ?f9 ?f8 ?f10 ?f11 ?f9" draw:text-areas="?f5 ?f5 ?f6 ?f7" svg:viewBox="0 0 0 0" draw:type="ooxml-roundRect" draw:modifiers="1129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187" draw:text-style-name="P10" draw:layer="layout" svg:width="21.335cm" svg:height="1.396cm" svg:x="2.032cm" svg:y="8.661cm">
          <text:p text:style-name="P9"><text:span text:style-name="T22">🎮 <text:s/>ghilli-tokenizer.streamlit.ap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39" draw:text-style-name="P22" draw:layer="layout" svg:width="22.351cm" svg:height="1.574cm" svg:x="1.524cm" svg:y="10.465cm">
          <text:p/>
          <draw:enhanced-geometry draw:mirror-horizontal="false" draw:mirror-vertical="false" draw:glue-points="?f8 0 0 ?f9 ?f8 ?f10 ?f11 ?f9" draw:text-areas="?f5 ?f5 ?f6 ?f7" svg:viewBox="0 0 0 0" draw:type="ooxml-roundRect" draw:modifiers="1129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188" draw:text-style-name="P10" draw:layer="layout" svg:width="21.335cm" svg:height="1.396cm" svg:x="2.032cm" svg:y="10.541cm">
          <text:p text:style-name="P9"><text:span text:style-name="T22">📄 <text:s/>Velayuthan &amp; Sarveswaran, COLING 2025 — aclanthology.org/2025.coling-main.40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89" draw:text-style-name="P4" draw:layer="layout" svg:width="22.351cm" svg:height="0.761cm" svg:x="1.524cm" svg:y="12.573cm">
          <text:p text:style-name="P3"><text:span text:style-name="T35">github.com/manoj-makkuboy <text:s/>· <text:s/>linkedin.com/in/manoj-mohan-1374a33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3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Stay on this slide during Q&amp;A so all links stay visible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90" draw:text-style-name="P4" draw:layer="layout" svg:width="22.351cm" svg:height="2.539cm" svg:x="1.524cm" svg:y="0.508cm">
          <text:p text:style-name="P3"><text:span text:style-name="T59">நன்றி</text:span><text:span text:style-name="T59">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91" draw:text-style-name="P4" draw:layer="layout" svg:width="22.351cm" svg:height="1.472cm" svg:x="1.524cm" svg:y="2.997cm">
          <text:p text:style-name="P3"><text:span text:style-name="T60">Thank Yo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92" draw:text-style-name="P23" draw:layer="layout" svg:width="7.619cm" svg:height="7.238cm" svg:x="8.89cm" svg:y="4.775cm">
          <text:p/>
          <draw:enhanced-geometry draw:mirror-horizontal="false" draw:mirror-vertical="false" draw:glue-points="?f8 0 0 ?f9 ?f8 ?f10 ?f11 ?f9" draw:text-areas="?f5 ?f5 ?f6 ?f7" svg:viewBox="0 0 0 0" draw:type="ooxml-roundRect" draw:modifiers="35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Image 0" draw:style-name="gr21" draw:text-style-name="P11" draw:layer="layout" svg:width="6.857cm" svg:height="6.603cm" svg:x="9.271cm" svg:y="5.105cm">
          <draw:image xlink:href="Pictures/100000000000012C0000012C2C86F56C.png" xlink:type="simple" xlink:show="embed" xlink:actuate="onLoad" draw:mime-type="image/png">
            <text:p/>
          </draw:image>
          <svg:desc>preencoded.png</svg:desc>
        </draw:frame>
        <draw:custom-shape draw:name="Shape 4" draw:style-name="gr22" draw:text-style-name="P12" draw:layer="layout" svg:width="11.175cm" svg:height="1.066cm" svg:x="7.112cm" svg:y="12.319cm">
          <text:p/>
          <draw:enhanced-geometry draw:mirror-horizontal="false" draw:mirror-vertical="false" draw:glue-points="?f8 0 0 ?f9 ?f8 ?f10 ?f11 ?f9" draw:text-areas="?f5 ?f5 ?f6 ?f7" svg:viewBox="0 0 0 0" draw:type="ooxml-roundRect" draw:modifiers="14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193" draw:text-style-name="P4" draw:layer="layout" svg:width="11.175cm" svg:height="1.066cm" svg:x="7.112cm" svg:y="12.319cm">
          <text:p text:style-name="P3"><text:span text:style-name="T47">in <text:s/>Connect on Linked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4" draw:text-style-name="P4" draw:layer="layout" svg:width="22.351cm" svg:height="0.71cm" svg:x="1.524cm" svg:y="13.513cm">
          <text:p text:style-name="P3"><text:span text:style-name="T35">linkedin.com/in/manoj-mohan-1374a33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5">Stay on this slide. Let people scan the QR code and connect on LinkedIn.</text:span></text:p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ptxGenJS Presentation</dc:title>
    <dc:subject>PptxGenJS Presentation</dc:subject>
    <meta:initial-creator>PptxGenJS</meta:initial-creator>
    <meta:editing-cycles>2</meta:editing-cycles>
    <meta:creation-date>2026-07-21T23:18:30</meta:creation-date>
    <dc:date>2026-07-22T04:52:36.343325000</dc:date>
    <meta:editing-duration>PT2M23S</meta:editing-duration>
    <meta:generator>LibreOffice/25.8.4.2$MacOSX_AARCH64 LibreOffice_project/290daaa01b999472f0c7a3890eb6a550fd74c6df</meta:generator>
    <meta:document-statistic meta:object-count="347"/>
    <meta:user-defined meta:name="AppVersion">16.0000</meta:user-defined>
    <meta:user-defined meta:name="Company">PptxGenJS</meta:user-defined>
    <meta:user-defined meta:name="Notes" meta:value-type="float">14</meta:user-defined>
    <meta:user-defined meta:name="PresentationFormat">On-screen Show (16:9)</meta:user-defined>
    <meta:user-defined meta:name="Slides" meta:value-type="float">14</meta:user-defined>
  </office:meta>
</office:document-meta>
</file>